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10000034E5080100CE4C528BF.png" manifest:media-type="image/png"/>
  <manifest:file-entry manifest:full-path="Pictures/10000201000001CA0000006A50C0B1ACD4488CE3.png" manifest:media-type="image/png"/>
  <manifest:file-entry manifest:full-path="Pictures/1000020100000526000002E06E5298383BB31DEA.png" manifest:media-type="image/png"/>
  <manifest:file-entry manifest:full-path="Pictures/1000000000000273000001E91F258B36B3CD5C52.png" manifest:media-type="image/png"/>
  <manifest:file-entry manifest:full-path="Pictures/100002010000043E0000010A4FDB87AEF32590D1.png" manifest:media-type="image/png"/>
  <manifest:file-entry manifest:full-path="Pictures/1000020100000242000000B59091AD3301E9F1D0.png" manifest:media-type="image/png"/>
  <manifest:file-entry manifest:full-path="Pictures/10000201000003AE000000E5FCEEB1D33F09FF31.png" manifest:media-type="image/png"/>
  <manifest:file-entry manifest:full-path="Pictures/100000000000007600000076FCE1CCE46FA52352.png" manifest:media-type="image/png"/>
  <manifest:file-entry manifest:full-path="Pictures/10000201000002B40000009420B6C3BE89E26930.png" manifest:media-type="image/png"/>
  <manifest:file-entry manifest:full-path="Pictures/1000020100000690000000F1A3C721F4C3B89C03.png" manifest:media-type="image/png"/>
  <manifest:file-entry manifest:full-path="Pictures/10000201000003870000003C25DD5E879A71B1D0.png" manifest:media-type="image/png"/>
  <manifest:file-entry manifest:full-path="Pictures/10000201000007730000007F78415BB649632BF4.png" manifest:media-type="image/png"/>
  <manifest:file-entry manifest:full-path="Pictures/1000020100000385000000D324C241C30CAD7F6F.png" manifest:media-type="image/png"/>
  <manifest:file-entry manifest:full-path="Pictures/10000201000004280000012FFEC8C84327EC70ED.png" manifest:media-type="image/png"/>
  <manifest:file-entry manifest:full-path="Pictures/10000201000001DE00000050EBDBC2A93FF147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StarSymbol" svg:font-family="StarSymbol, 'Arial Unicode MS'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27d438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bold" officeooo:rsid="00195aa5" officeooo:paragraph-rsid="00195aa5" style:font-name-asian="DejaVu Sans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bold" officeooo:rsid="00d1afef" officeooo:paragraph-rsid="00d1afef" style:font-name-asian="DejaVu Sans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bold" officeooo:rsid="00763ba3" officeooo:paragraph-rsid="00763ba3" style:font-name-asian="DejaVu Sans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bold" officeooo:rsid="00d52099" officeooo:paragraph-rsid="00d52099" fo:background-color="#ffffff" style:font-name-asian="DejaVu Sans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bold" officeooo:rsid="00d52099" officeooo:paragraph-rsid="00d5e424" fo:background-color="#ffffff" style:font-name-asian="DejaVu Sans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80fda7" officeooo:paragraph-rsid="0080fda7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80fda7" officeooo:paragraph-rsid="008e6992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899f9d" officeooo:paragraph-rsid="00899f9d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899f9d" officeooo:paragraph-rsid="008e6992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8c7881" officeooo:paragraph-rsid="008c7881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934085" officeooo:paragraph-rsid="00934085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934085" officeooo:paragraph-rsid="00da886e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3966b" officeooo:paragraph-rsid="00d3966b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52099" officeooo:paragraph-rsid="00d52099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5e424" officeooo:paragraph-rsid="00d5e424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b6349a" officeooo:paragraph-rsid="00b6349a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a886e" officeooo:paragraph-rsid="00da886e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a886e" officeooo:paragraph-rsid="00dede13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1afef" officeooo:paragraph-rsid="00d1afef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7cfea6" officeooo:paragraph-rsid="007cfea6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e481cc" officeooo:paragraph-rsid="00e481cc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ES" fo:font-style="normal" style:text-underline-style="none" fo:font-weight="normal" officeooo:rsid="00901458" officeooo:paragraph-rsid="00901458" style:font-name-asian="DejaVu Sans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ES" fo:font-style="normal" style:text-underline-style="none" fo:font-weight="normal" officeooo:rsid="00dccfa6" officeooo:paragraph-rsid="00e2b709" style:font-name-asian="DejaVu Sans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bold" officeooo:rsid="007cfea6" officeooo:paragraph-rsid="007cfea6" style:font-name-asian="DejaVu Sans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7cfea6" officeooo:paragraph-rsid="007cfea6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80fda7" officeooo:paragraph-rsid="0080fda7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80fda7" officeooo:paragraph-rsid="00d7e23d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b6349a" officeooo:paragraph-rsid="00b6349a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da886e" officeooo:paragraph-rsid="00da886e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da886e" officeooo:paragraph-rsid="00ea84f8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b10148" officeooo:paragraph-rsid="00d52099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80fda7" officeooo:paragraph-rsid="0080fda7" fo:background-color="#ffffff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333333" style:font-name="Arial" fo:font-size="11pt" fo:language="es" fo:country="CO" fo:font-weight="normal" officeooo:rsid="00d6936f" officeooo:paragraph-rsid="00d6936f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333333" style:font-name="Arial" fo:font-size="11pt" fo:language="es" fo:country="CO" fo:font-weight="normal" officeooo:rsid="00d6936f" officeooo:paragraph-rsid="00d7e23d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666666" style:font-name="Arial" fo:font-size="11pt" fo:language="es" fo:country="CO" fo:font-weight="normal" officeooo:rsid="00a4b34e" officeooo:paragraph-rsid="00ef73af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899f9d" officeooo:paragraph-rsid="00899f9d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6936f" officeooo:paragraph-rsid="00d6936f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899f9d" officeooo:paragraph-rsid="00d6936f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899f9d" officeooo:paragraph-rsid="00899f9d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4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4c4c4c" style:font-name="Arial" fo:font-size="20pt" fo:language="es" fo:country="CO" fo:font-weight="bold" style:font-name-asian="DejaVu Sans" style:font-size-asian="20pt" style:language-asian="zxx" style:country-asian="none" style:font-weight-asian="bold" style:font-name-complex="Arial" style:font-size-complex="20pt" style:language-complex="zxx" style:country-complex="none" style:font-weight-complex="bold"/>
    </style:style>
    <style:style style:name="P42" style:family="paragraph" style:parent-style-name="Title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4c4c4c" style:font-name="Arial" fo:font-size="11pt" fo:language="es" fo:country="CO" fo:font-weight="bold" style:font-name-asian="DejaVu Sans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4c4c4c" style:font-name="Arial" fo:font-size="20pt" fo:language="es" fo:country="CO" fo:font-style="normal" fo:text-shadow="none" fo:font-weight="bold" officeooo:rsid="007a509c" officeooo:paragraph-rsid="007a509c" style:font-name-asian="DejaVu Sans" style:font-size-asian="20pt" style:language-asian="zxx" style:country-asian="none" style:font-style-asian="normal" style:font-weight-asian="bold" style:font-name-complex="Arial" style:font-size-complex="20pt" style:language-complex="zxx" style:country-complex="none" style:font-style-complex="normal" style:font-weight-complex="bold"/>
    </style:style>
    <style:style style:name="P44" style:family="paragraph" style:parent-style-name="Subtitl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4c4c4c" style:font-name="Arial" fo:font-size="20pt" fo:language="es" fo:country="CO" fo:font-weight="bold" officeooo:paragraph-rsid="00700abc" style:font-name-asian="DejaVu Sans" style:font-size-asian="20pt" style:language-asian="zxx" style:country-asian="none" style:font-weight-asian="bold" style:font-name-complex="Arial" style:font-size-complex="20pt" style:language-complex="zxx" style:country-complex="none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ff0000" style:font-name="Arial" fo:font-size="11pt" fo:language="es" fo:country="CO" fo:font-weight="normal" officeooo:rsid="007f1b41" officeooo:paragraph-rsid="00d52099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52099" officeooo:paragraph-rsid="010c27d2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89cm"/>
        </style:tab-stops>
      </style:paragraph-properties>
      <style:text-properties fo:color="#4c4c4c" style:font-name="Arial" fo:font-size="11pt" fo:language="es" fo:country="CO" fo:font-weight="normal" officeooo:rsid="00d52099" officeooo:paragraph-rsid="00763ba3" style:font-name-asian="DejaVu Sans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T1" style:family="text">
      <style:text-properties fo:color="#4c4c4c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4c4c4c"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fo:color="#4c4c4c" style:font-name="Arial" fo:font-size="9pt" style:font-size-asian="9pt" style:font-name-complex="Arial" style:font-size-complex="9pt"/>
    </style:style>
    <style:style style:name="T4" style:family="text">
      <style:text-properties fo:color="#4c4c4c" style:font-name="Arial" fo:font-size="9pt" fo:letter-spacing="-0.035cm" fo:font-weight="normal" officeooo:rsid="001d7081" style:font-size-asian="9pt" style:font-weight-asian="normal" style:font-name-complex="Arial" style:font-size-complex="9pt" style:font-weight-complex="normal"/>
    </style:style>
    <style:style style:name="T5" style:family="text">
      <style:text-properties fo:color="#4c4c4c" style:font-name="Arial" fo:font-size="9pt" fo:font-weight="normal" style:font-size-asian="9pt" style:font-weight-asian="normal" style:font-name-complex="Arial" style:font-size-complex="9pt" style:font-weight-complex="normal"/>
    </style:style>
    <style:style style:name="T6" style:family="text">
      <style:text-properties fo:color="#4c4c4c" style:font-name="Arial" fo:font-size="9pt" fo:font-weight="normal" officeooo:rsid="0027d438" style:font-size-asian="9pt" style:font-weight-asian="normal" style:font-name-complex="Arial" style:font-size-complex="9pt" style:font-weight-complex="normal"/>
    </style:style>
    <style:style style:name="T7" style:family="text">
      <style:text-properties fo:color="#000000" style:font-name="Arial" fo:font-size="9pt" fo:font-weight="bold" style:font-size-asian="9pt" style:font-weight-asian="bold" style:font-name-complex="Arial" style:font-size-complex="9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db91a" style:font-weight-asian="normal" style:font-weight-complex="normal"/>
    </style:style>
    <style:style style:name="T10" style:family="text">
      <style:text-properties officeooo:rsid="00899f9d"/>
    </style:style>
    <style:style style:name="T11" style:family="text">
      <style:text-properties officeooo:rsid="008b2064"/>
    </style:style>
    <style:style style:name="T12" style:family="text">
      <style:text-properties officeooo:rsid="00c349c9"/>
    </style:style>
    <style:style style:name="T13" style:family="text">
      <style:text-properties fo:font-weight="bold" officeooo:rsid="00d52099" fo:background-color="#ffffff" loext:char-shading-value="0" style:font-weight-asian="bold" style:font-weight-complex="bold"/>
    </style:style>
    <style:style style:name="T14" style:family="text">
      <style:text-properties fo:font-style="normal" fo:text-shadow="none" officeooo:rsid="00262568" style:font-style-asian="normal" style:font-style-complex="normal"/>
    </style:style>
    <style:style style:name="T15" style:family="text">
      <style:text-properties fo:font-style="normal" fo:text-shadow="none" officeooo:rsid="001e12c1" style:font-style-asian="normal" style:font-style-complex="normal"/>
    </style:style>
    <style:style style:name="T16" style:family="text">
      <style:text-properties fo:font-style="normal" fo:text-shadow="none" officeooo:rsid="007a509c" style:font-style-asian="normal" style:font-style-complex="normal"/>
    </style:style>
    <style:style style:name="T17" style:family="text">
      <style:text-properties officeooo:rsid="00d52099"/>
    </style:style>
    <style:style style:name="T18" style:family="text">
      <style:text-properties officeooo:rsid="007cfea6"/>
    </style:style>
    <style:style style:name="T19" style:family="text">
      <style:text-properties officeooo:rsid="00d52099" fo:background-color="#ffffff" loext:char-shading-value="0"/>
    </style:style>
    <style:style style:name="T20" style:family="text">
      <style:text-properties officeooo:rsid="00d6936f"/>
    </style:style>
    <style:style style:name="T21" style:family="text">
      <style:text-properties officeooo:rsid="00d7e23d"/>
    </style:style>
    <style:style style:name="T22" style:family="text">
      <style:text-properties officeooo:rsid="00d929cd"/>
    </style:style>
    <style:style style:name="T23" style:family="text">
      <style:text-properties officeooo:rsid="00da886e"/>
    </style:style>
    <style:style style:name="T24" style:family="text">
      <style:text-properties style:use-window-font-color="true"/>
    </style:style>
    <style:style style:name="T25" style:family="text">
      <style:text-properties officeooo:rsid="00e2b709"/>
    </style:style>
    <style:style style:name="T26" style:family="text">
      <style:text-properties officeooo:rsid="00ee9aa2"/>
    </style:style>
    <style:style style:name="T27" style:family="text">
      <style:text-properties officeooo:rsid="00fdbe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6" draw:name="graphics20" text:anchor-type="paragraph" svg:x="17.471cm" svg:y="0.025cm" svg:width="1.499cm" svg:height="1.499cm" draw:z-index="0"><draw:image xlink:href="Pictures/100000000000007600000076FCE1CCE46FA52352.png" xlink:type="simple" xlink:show="embed" xlink:actuate="onLoad" loext:mime-type="image/png"/></draw:frame></text:p>
      <text:p text:style-name="P44"><text:span text:style-name="T14">Instructivo</text:span><text:span text:style-name="T15"> </text:span><text:span text:style-name="T16">Actualización tabla</text:span></text:p>
      <text:p text:style-name="P43">resolucion_ruaf</text:p>
      <text:p text:style-name="P42"/>
      <text:p text:style-name="P20">Debido al peso del archivo y con el fin de que el cargue no sea tan demorado, se realiza la descarga a una ruta local. Para obtener el archivo se ingresa al ftp del ministerio y se descarga a la ruta local, en este ejemplo se envía a /home/olga.penagos/Documentos</text:p>
      <text:p text:style-name="P3"/>
      <text:p text:style-name="P14">Se descarga archivo con estructura nombre: RUA200AAFP20221125NI000900474727_OP000000000086.dat.ZIP</text:p>
      <text:p text:style-name="P3"/>
      <text:p text:style-name="P3"><draw:frame draw:style-name="fr4" draw:name="Imagen1" text:anchor-type="paragraph" svg:width="13.633cm" svg:height="7.613cm" draw:z-index="1"><draw:image xlink:href="Pictures/1000020100000526000002E06E5298383BB31DEA.png" xlink:type="simple" xlink:show="embed" xlink:actuate="onLoad" loext:mime-type="image/png"/></draw:frame></text:p>
      <text:p text:style-name="P2"/>
      <text:p text:style-name="P14">Este archivo llega cifrado y para descomprimirlo hay que usar unas llaves emitidas por el ministerio y se usan por medio del aplicativo CRYPTON</text:p>
      <text:p text:style-name="P14"/>
      <text:p text:style-name="P22">Ir a terminal y digitar : cd /p_wrk1/Cifrado_Ministerio/CRYPTON/</text:p>
      <text:p text:style-name="P22">ejecutar : java -jar Encripcion.jar</text:p>
      <text:p text:style-name="P22">Ir a pestaña desencriptar buscar el archivo y ejecutar, esperar a que desencripte</text:p>
      <text:p text:style-name="P14"/>
      <text:p text:style-name="P14"><draw:frame draw:style-name="fr4" draw:name="Imagen2" text:anchor-type="paragraph" svg:width="8.902cm" svg:height="6.943cm" draw:z-index="2"><draw:image xlink:href="Pictures/1000000000000273000001E91F258B36B3CD5C52.png" xlink:type="simple" xlink:show="embed" xlink:actuate="onLoad" loext:mime-type="image/png"/></draw:frame></text:p>
      <text:p text:style-name="P14"><text:soft-page-break/></text:p>
      <text:p text:style-name="P2"/>
      <text:p text:style-name="P14">Ingresar al servidor la base de datos de interssi que este asignada a pruebas, en este caso es servidor 10.10.11.161 y base de datos interssi, para acceder se usa el comando</text:p>
      <text:p text:style-name="P32"/>
      <text:p text:style-name="P32">unzip RUA200AAFP20250425NI000900474727_OP000000000086.dat.ZIP</text:p>
      <text:p text:style-name="P32"/>
      <text:p text:style-name="P32"/>
      <text:p text:style-name="P32">psql -h 10.10.11.161 -U jamaica -d interssi</text:p>
      <text:p text:style-name="P36">J4r3sJ41m3T0rr35</text:p>
      <text:p text:style-name="P32"/>
      <text:p text:style-name="P32"/>
      <text:p text:style-name="P32"><draw:frame draw:style-name="fr2" draw:name="Imagen3" text:anchor-type="paragraph" svg:width="12.522cm" svg:height="3.921cm" draw:z-index="3"><draw:image xlink:href="Pictures/1000020100000242000000B59091AD3301E9F1D0.png" xlink:type="simple" xlink:show="embed" xlink:actuate="onLoad" loext:mime-type="image/png"/></draw:frame></text:p>
      <text:p text:style-name="P15">Se eliminan las tablas <text:span text:style-name="T18">unificadas </text:span>y <text:span text:style-name="T18">resolucion_ruaf. </text:span>Posteriormente se vuelven a crear con los comandos</text:p>
      <text:p text:style-name="P21"/>
      <text:p text:style-name="P25"><text:span text:style-name="T8">DROP TABLE </text:span><text:span text:style-name="T9">IF EXISTS </text:span><text:span text:style-name="T8">unificadas;</text:span></text:p>
      <text:p text:style-name="P26">CREATE TABLE unificadas ( Datos_total character varying(35) );</text:p>
      <text:p text:style-name="P26">DROP TABLE <text:span text:style-name="T10">IF EXISTS </text:span>resolucion_ruaf;</text:p>
      <text:p text:style-name="P26">CREATE TABLE resolucion_ruaf ( tipo_documento character varying(3), nro_documento character varying(17), cod_administradora character varying(6), fecha character varying(10));</text:p>
      <text:p text:style-name="P26">CREATE INDEX idx_ruaf ON resolucion_ruaf USING btree (tipo_documento, nro_documento);</text:p>
      <text:p text:style-name="P26"/>
      <text:p text:style-name="P15"><draw:frame draw:style-name="fr3" draw:name="Imagen7" text:anchor-type="paragraph" svg:width="19.59cm" svg:height="2.81cm" draw:z-index="4"><draw:image xlink:href="Pictures/1000020100000690000000F1A3C721F4C3B89C03.png" xlink:type="simple" xlink:show="embed" xlink:actuate="onLoad" loext:mime-type="image/png"/></draw:frame></text:p>
      <text:p text:style-name="P15">Se realiza el insert a la tabla unificadas con el archivo descargado del ftp del ministerio, con el comando:</text:p>
      <text:p text:style-name="P4"/>
      <text:p text:style-name="P45">\copy unificadas FROM /home/pardo.contreras/Vídeos/RUA200AAFP20251125NI000900474727.dat</text:p>
      <text:p text:style-name="P46">Acá se debe cuadrar la ruta según donde se este procesando</text:p>
      <text:p text:style-name="P47"/>
      <text:p text:style-name="P7"><draw:frame draw:style-name="fr5" draw:name="Imagen8" text:anchor-type="paragraph" svg:x="0cm" svg:y="0cm" svg:width="19.59cm" svg:height="1.3cm" draw:z-index="5"><draw:image xlink:href="Pictures/10000201000003870000003C25DD5E879A71B1D0.png" xlink:type="simple" xlink:show="embed" xlink:actuate="onLoad" loext:mime-type="image/png"/></draw:frame></text:p>
      <text:p text:style-name="P15">Se va a realizar una consulta para verificar que formato tiene la fecha, con este resultado hay que tener en cuenta:</text:p>
      <text:p text:style-name="P15">1. Si el formato es AAAA-MM-DD, se debe ejecutar el script 1</text:p>
      <text:p text:style-name="P15">2. Si el formato es AAAAMMDD, se debe ejecutar el script 2</text:p>
      <text:p text:style-name="P7"/>
      <text:p text:style-name="P27">SELECT datos_total, SUBSTR (datos_total,1,2) AS tipo_doc, SUBSTR (datos_total,3,16) AS documento, SUBSTR (datos_total,19,6) AS adminis, SUBSTR (datos_total,25,10) AS fecha FROM unificadas LIMIT 5;</text:p>
      <text:p text:style-name="P27"/>
      <text:p text:style-name="P9">El anterior script nos indica que tipo de formato tiene el campo fecha.</text:p>
      <text:p text:style-name="P9"><text:soft-page-break/></text:p>
      <text:p text:style-name="P7"><draw:frame draw:style-name="fr4" draw:name="Imagen9" text:anchor-type="paragraph" svg:width="14.552cm" svg:height="3.537cm" draw:z-index="6"><draw:image xlink:href="Pictures/10000201000003AE000000E5FCEEB1D33F09FF31.png" xlink:type="simple" xlink:show="embed" xlink:actuate="onLoad" loext:mime-type="image/png"/></draw:frame></text:p>
      <text:p text:style-name="P7"/>
      <text:p text:style-name="P5">SCRIPT 1 (<text:span text:style-name="T8">AAAA-MM-DD</text:span>)</text:p>
      <text:p text:style-name="P33">* INSERT INTO resolucion_ruaf SELECT SUBSTR (datos_total,1,2) AS tipo_doc, SUBSTR (datos_total,3,16)::BIGINT AS documento, SUBSTR (datos_total,19,6) AS adminis, SUBSTR (datos_total,25,8) AS fecha FROM unificadas;</text:p>
      <text:p text:style-name="P7"/>
      <text:p text:style-name="P7"/>
      <text:p text:style-name="P7"/>
      <text:p text:style-name="P5">SCRIPT 2 (<text:span text:style-name="T8">AAAAMMDD</text:span>)</text:p>
      <text:p text:style-name="P7"/>
      <text:p text:style-name="P27"><text:span text:style-name="T17">I</text:span>NSERT INTO resolucion_ruaf <text:bookmark-start text:name="__DdeLink__3954_1720276299"/>SELECT SUBSTR (datos_total,1,2) AS tipo_doc, SUBSTR (datos_total,3,16)::BIGINT AS documento, SUBSTR (datos_total,19,6) AS adminis, SUBSTR (datos_total,25,4) || '-' || SUBSTR (datos_total,29,2)|| '-' || SUBSTR (datos_total,31,2) FROM unificadas;<text:bookmark-end text:name="__DdeLink__3954_1720276299"/></text:p>
      <text:p text:style-name="P7"/>
      <text:p text:style-name="P16">Para el ejemplo de este caso el formato es AAAAMMDD y debido a esto se usa <text:span text:style-name="T13">SCRIPT 2 (</text:span><text:span text:style-name="T19">AAAAMMDD</text:span><text:span text:style-name="T13">)</text:span></text:p>
      <text:p text:style-name="P6"/>
      <text:p text:style-name="P6"><draw:frame draw:style-name="fr3" draw:name="Imagen5" text:anchor-type="paragraph" svg:width="19.59cm" svg:height="1.304cm" draw:z-index="11"><draw:image xlink:href="Pictures/10000201000007730000007F78415BB649632BF4.png" xlink:type="simple" xlink:show="embed" xlink:actuate="onLoad" loext:mime-type="image/png"/></draw:frame></text:p>
      <text:p text:style-name="P16">Validar que el campo de la <text:span text:style-name="T20">fecha</text:span> no tenga <text:span text:style-name="T20">fechas diligenciadas con longitud 8 (AAAAMMDD), si los tiene se debe validar y corregir.</text:span></text:p>
      <text:p text:style-name="P17"/>
      <text:p text:style-name="P29">SELECT count(*) from resolucion_ruaf where length(fecha) = '<text:span text:style-name="T20">8</text:span>' ;</text:p>
      <text:p text:style-name="P29"/>
      <text:p text:style-name="P29"><draw:frame draw:style-name="fr2" draw:name="Imagen11" text:anchor-type="paragraph" svg:width="15.536cm" svg:height="3.323cm" draw:z-index="7"><draw:image xlink:href="Pictures/10000201000002B40000009420B6C3BE89E26930.png" xlink:type="simple" xlink:show="embed" xlink:actuate="onLoad" loext:mime-type="image/png"/></draw:frame></text:p>
      <text:p text:style-name="P29"/>
      <text:p text:style-name="P34">Validar que no existan administradoras que tengan espacios en el <text:span text:style-name="T21">código</text:span> de la administradora, si hay se deben corregir.</text:p>
      <text:p text:style-name="P34"/>
      <text:p text:style-name="P27"><text:span text:style-name="T20">S</text:span><text:bookmark-start text:name="__DdeLink__400_966898011"/>ELECT COUNT (1), cod_administradora || '-' <text:span text:style-name="T11">AS codigo_admin </text:span>FROM resolucion_ruaf GROUP BY cod_administradora;<text:bookmark-end text:name="__DdeLink__400_966898011"/></text:p>
      <text:p text:style-name="P7"/>
      <text:p text:style-name="P11"><draw:frame draw:style-name="fr2" draw:name="Imagen12" text:anchor-type="paragraph" svg:width="17.642cm" svg:height="4.322cm" draw:z-index="8"><draw:image xlink:href="Pictures/100002010000043E0000010A4FDB87AEF32590D1.png" xlink:type="simple" xlink:show="embed" xlink:actuate="onLoad" loext:mime-type="image/png"/></draw:frame><text:soft-page-break/></text:p>
      <text:p text:style-name="P7"/>
      <text:p text:style-name="P37"/>
      <text:p text:style-name="P37"/>
      <text:p text:style-name="P38"/>
      <text:p text:style-name="P38"/>
      <text:p text:style-name="P38">Para corregirlos se usa la siguiente sentencia</text:p>
      <text:p text:style-name="P37"/>
      <text:p text:style-name="P39"><text:bookmark-start text:name="__DdeLink__404_2375254094"/>UPDATE resolucion_ruaf SET cod_administradora='25-14' WHERE cod_administradora='25-14 ';</text:p>
      <text:p text:style-name="P39">UPDATE resolucion_ruaf SET cod_administradora='25-2' WHERE cod_administradora='25-2 <text:s/>';</text:p>
      <text:p text:style-name="P40">UPDATE resolucion_ruaf SET cod_administradora='25-3' WHERE cod_administradora='25-3 <text:s/>';</text:p>
      <text:p text:style-name="P40"><text:bookmark-start text:name="__DdeLink__1293_3630191883"/>UPDATE resolucion_ruaf SET cod_administradora='25-7' WHERE cod_administradora='25-7 <text:s/>';<text:bookmark-end text:name="__DdeLink__1293_3630191883"/><text:bookmark-end text:name="__DdeLink__404_2375254094"/></text:p>
      <text:p text:style-name="P10"/>
      <text:p text:style-name="P10"><draw:frame draw:style-name="fr2" draw:name="Imagen13" text:anchor-type="paragraph" svg:width="18.008cm" svg:height="4.216cm" draw:z-index="9"><draw:image xlink:href="Pictures/1000020100000385000000D324C241C30CAD7F6F.png" xlink:type="simple" xlink:show="embed" xlink:actuate="onLoad" loext:mime-type="image/png"/></draw:frame></text:p>
      <text:p text:style-name="P35"><text:span text:style-name="T21">Una vez corregido se verifica q</text:span>ue no existan administradoras que tengan espacios en el <text:span text:style-name="T21">código</text:span> de la administradora, si hay se deben corregir.</text:p>
      <text:p text:style-name="P35"/>
      <text:p text:style-name="P28"><text:span text:style-name="T20">S</text:span><text:bookmark-start text:name="__DdeLink__400_9668980111"/>ELECT COUNT (1), cod_administradora || '-' <text:span text:style-name="T11">AS codigo_admin </text:span>FROM resolucion_ruaf GROUP BY cod_administradora;<text:bookmark-end text:name="__DdeLink__400_9668980111"/></text:p>
      <text:p text:style-name="P8"/>
      <text:p text:style-name="P7"><draw:frame draw:style-name="fr3" draw:name="Imagen4" text:anchor-type="paragraph" svg:width="19.59cm" svg:height="5.577cm" draw:z-index="10"><draw:image xlink:href="Pictures/10000201000004280000012FFEC8C84327EC70ED.png" xlink:type="simple" xlink:show="embed" xlink:actuate="onLoad" loext:mime-type="image/png"/></draw:frame></text:p>
      <text:p text:style-name="P19">Revisar que los datos cargados concuerdan con los que llegaron en el archivo, para esto se utilizan las <text:span text:style-name="T24">sentencias:</text:span> </text:p>
      <text:p text:style-name="P12"/>
      <text:p text:style-name="P30"><text:bookmark-start text:name="__DdeLink__774_1457115469"/><text:soft-page-break/>SELECT count(*) from resolucion_ruaf ;<text:bookmark-end text:name="__DdeLink__774_1457115469"/></text:p>
      <text:p text:style-name="P31">wc -l RUA200AAFP20251125NI000900474727.dat</text:p>
      <text:p text:style-name="P12"/>
      <text:p text:style-name="P12"><draw:frame draw:style-name="fr2" draw:name="Imagen6" text:anchor-type="paragraph" svg:width="9.897cm" svg:height="1.656cm" draw:z-index="12"><draw:image xlink:href="Pictures/10000201000001DE00000050EBDBC2A93FF14765.png" xlink:type="simple" xlink:show="embed" xlink:actuate="onLoad" loext:mime-type="image/png"/></draw:frame></text:p>
      <text:p text:style-name="P12"><draw:frame draw:style-name="fr2" draw:name="Imagen10" text:anchor-type="paragraph" svg:width="9.347cm" svg:height="2.164cm" draw:z-index="13"><draw:image xlink:href="Pictures/10000201000001CA0000006A50C0B1ACD4488CE3.png" xlink:type="simple" xlink:show="embed" xlink:actuate="onLoad" loext:mime-type="image/png"/></draw:frame></text:p>
      <text:p text:style-name="P12"/>
      <text:p text:style-name="P12"/>
      <text:p text:style-name="P12"/>
      <text:p text:style-name="P12">Enviar ticket a redes para que realicen la actualización de la tabla “resolucion_ruaf” desde el blade 10.10.1<text:span text:style-name="T23">1</text:span>.<text:span text:style-name="T26">163</text:span> a la base de datos “bdua-fosyga” tabla “resolucion_ruaf”, adjuntando la anterior consulta.</text:p>
      <text:p text:style-name="P12"/>
      <text:p text:style-name="P12">Ejemplo:</text:p>
      <text:p text:style-name="P12"/>
      <text:p text:style-name="P13">Buen<text:span text:style-name="T22">as Tardes</text:span><text:line-break/><text:line-break/>* Por favor ejecutar después de las 6 pm *<text:line-break/><text:line-break/>Favor actualizar información desde la base de datos "interssi", <text:span text:style-name="T23">servidor</text:span> 10.10.11.<text:span text:style-name="T26">16</text:span><text:span text:style-name="T27">1</text:span>, tabla "resolucion_ruaf" a la base de datos "bdua_fosyga" de produccion 10.10.11.<text:span text:style-name="T23">19</text:span> tabla "resolucion_ruaf".<text:line-break/><text:line-break/><text:span text:style-name="T23">A</text:span>ntes de copiar la información ejecutar truncate </text:p>
      <text:p text:style-name="P13">truncate <text:span text:style-name="T12">table </text:span>resolucion_ruaf; <text:line-break/></text:p>
      <text:p text:style-name="P18">Posteriormente realizar este conteo y verificar que concuerde el resultado.</text:p>
      <text:p text:style-name="P18"/>
      <text:p text:style-name="P18">interssi=# SELECT count(*) from resolucion_ruaf ;</text:p>
      <text:p text:style-name="P18"><text:s text:c="2"/>count <text:s text:c="2"/></text:p>
      <text:p text:style-name="P18">----------</text:p>
      <text:p text:style-name="P18"><text:s/>17868588</text:p>
      <text:p text:style-name="P18">(1 row)</text:p>
      <text:p text:style-name="P13"/>
      <text:p text:style-name="P18">Gracias.</text:p>
      <text:p text:style-name="P13"/>
      <text:p text:style-name="P18">Cordial Saludo.</text:p>
      <text:p text:style-name="P13"><text:line-break/>**********************************************************************************</text:p>
      <text:p text:style-name="P12"/>
      <text:p text:style-name="P23"><draw:frame draw:style-name="fr1" draw:name="Imagen14" text:anchor-type="paragraph" svg:width="19.59cm" svg:height="9.673cm" draw:z-index="14"><draw:image xlink:href="Pictures/10000201000006B10000034E5080100CE4C528BF.png" xlink:type="simple" xlink:show="embed" xlink:actuate="onLoad" loext:mime-type="image/png"/></draw:frame><text:soft-page-break/></text:p>
      <text:p text:style-name="P24">Finalmente se guarda archivo RUA200AAFP20221125NI000900474727_OP000000000086.dat.ZIP en la ruta <text:s/><text:span text:style-name="T25">/4.6.2.1_Recaudo/Cargues_Archivos/PUB205AFR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StarSymbol" svg:font-family="StarSymbol, 'Arial Unicode MS'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DejaVu Sans" fo:font-family="'DejaVu Sans'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Andale Sans UI" style:font-family-complex="'Andale Sans UI', 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-Default_20_Paragraph_20_Font1" style:display-name="WW-Default Paragraph Font1" style:family="text"/>
    <style:style style:name="Page_20_Number" style:display-name="Page Number" style:family="text" style:parent-style-name="WW-Default_20_Paragraph_20_Font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OpenSymbol1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OpenSymbol1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OpenSymbol1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OpenSymbol1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OpenSymbol1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Open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Open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7d438"/>
    </style:style>
    <style:style style:name="MT1" style:family="text">
      <style:text-properties fo:color="#4c4c4c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4c4c4c" style:font-name="Arial" fo:font-size="9pt" style:font-size-asian="9pt" style:font-name-complex="Arial" style:font-size-complex="9pt"/>
    </style:style>
    <style:style style:name="MT3" style:family="text">
      <style:text-properties fo:color="#4c4c4c" style:font-name="Arial" fo:font-size="9pt" fo:letter-spacing="-0.035cm" fo:font-weight="normal" officeooo:rsid="001d7081" style:font-size-asian="9pt" style:font-weight-asian="normal" style:font-name-complex="Arial" style:font-size-complex="9pt" style:font-weight-complex="normal"/>
    </style:style>
    <style:style style:name="MT4" style:family="text">
      <style:text-properties fo:color="#4c4c4c" style:font-name="Arial" fo:font-size="9pt" fo:font-weight="bold" style:font-size-asian="9pt" style:font-weight-asian="bold" style:font-name-complex="Arial" style:font-size-complex="9pt" style:font-weight-complex="bold"/>
    </style:style>
    <style:style style:name="MT5" style:family="text">
      <style:text-properties fo:color="#4c4c4c" style:font-name="Arial" fo:font-size="9pt" fo:font-weight="normal" style:font-size-asian="9pt" style:font-weight-asian="normal" style:font-name-complex="Arial" style:font-size-complex="9pt" style:font-weight-complex="normal"/>
    </style:style>
    <style:style style:name="MT6" style:family="text">
      <style:text-properties fo:color="#4c4c4c" style:font-name="Arial" fo:font-size="9pt" fo:font-weight="normal" officeooo:rsid="0027d438" style:font-size-asian="9pt" style:font-weight-asian="normal" style:font-name-complex="Arial" style:font-size-complex="9pt" style:font-weight-complex="normal"/>
    </style:style>
    <style:style style:name="MT7" style:family="text">
      <style:text-properties fo:color="#000000" style:font-name="Arial" fo:font-size="9pt" fo:font-weight="bold" style:font-size-asian="9pt" style:font-weight-asian="bold" style:font-name-complex="Arial" style:font-size-complex="9pt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ódigo:</text:span><text:span text:style-name="MT2"> </text:span><text:span text:style-name="Page_20_Number"><text:span text:style-name="MT3">IN-IG-SP-1</text:span></text:span><text:span text:style-name="MT2"> / </text:span><text:span text:style-name="MT4">Versión:</text:span><text:span text:style-name="MT1"> </text:span><text:span text:style-name="MT5">No. </text:span><text:span text:style-name="MT6">1</text:span><text:span text:style-name="MT1"> / Pagina:</text:span><text:span text:style-name="MT2"> </text:span><text:span text:style-name="MT2"><text:page-number text:select-page="current">6</text:page-number></text:span><text:span text:style-name="MT2">/</text:span><text:span text:style-name="MT2"><text:page-count style:num-format="1">6</text:page-count></text:span><text:span text:style-name="MT2"> / </text:span><text:span text:style-name="MT7">Jaime Torres C. y Cia. S.A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7-26T11:21:00.09</meta:creation-date>
    <meta:generator>LibreOffice/6.4.7.2$Linux_X86_64 LibreOffice_project/40$Build-2</meta:generator>
    <dc:date>2025-12-26T16:01:44.369478421</dc:date>
    <meta:editing-duration>P5DT1H25M18S</meta:editing-duration>
    <meta:editing-cycles>168</meta:editing-cycles>
    <meta:print-date>2016-04-25T14:34:47.604474728</meta:print-date>
    <meta:document-statistic meta:table-count="0" meta:image-count="15" meta:object-count="0" meta:page-count="6" meta:paragraph-count="60" meta:word-count="688" meta:character-count="5188" meta:non-whitespace-character-count="4542"/>
  </office:meta>
</office:document-meta>
</file>